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7226" calcext:value-type="float">
            <text:p>0.427226</text:p>
          </table:table-cell>
          <table:table-cell office:value-type="float" office:value="0.391119" calcext:value-type="float">
            <text:p>0.391119</text:p>
          </table:table-cell>
          <table:table-cell office:value-type="float" office:value="0.649841" calcext:value-type="float">
            <text:p>0.649841</text:p>
          </table:table-cell>
          <table:table-cell office:value-type="float" office:value="3.532966" calcext:value-type="float">
            <text:p>3.532966</text:p>
          </table:table-cell>
          <table:table-cell office:value-type="float" office:value="2.023399" calcext:value-type="float">
            <text:p>2.023399</text:p>
          </table:table-cell>
          <table:table-cell office:value-type="float" office:value="-6.177572" calcext:value-type="float">
            <text:p>-6.177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5682" calcext:value-type="float">
            <text:p>0.515682</text:p>
          </table:table-cell>
          <table:table-cell office:value-type="float" office:value="0.474823" calcext:value-type="float">
            <text:p>0.474823</text:p>
          </table:table-cell>
          <table:table-cell office:value-type="float" office:value="0.789797" calcext:value-type="float">
            <text:p>0.789797</text:p>
          </table:table-cell>
          <table:table-cell office:value-type="float" office:value="4.289056" calcext:value-type="float">
            <text:p>4.289056</text:p>
          </table:table-cell>
          <table:table-cell office:value-type="float" office:value="2.336307" calcext:value-type="float">
            <text:p>2.336307</text:p>
          </table:table-cell>
          <table:table-cell office:value-type="float" office:value="-7.487379" calcext:value-type="float">
            <text:p>-7.487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2528" calcext:value-type="float">
            <text:p>0.642528</text:p>
          </table:table-cell>
          <table:table-cell office:value-type="float" office:value="0.594589" calcext:value-type="float">
            <text:p>0.594589</text:p>
          </table:table-cell>
          <table:table-cell office:value-type="float" office:value="0.992361" calcext:value-type="float">
            <text:p>0.992361</text:p>
          </table:table-cell>
          <table:table-cell office:value-type="float" office:value="5.3709" calcext:value-type="float">
            <text:p>5.3709</text:p>
          </table:table-cell>
          <table:table-cell office:value-type="float" office:value="2.795281" calcext:value-type="float">
            <text:p>2.795281</text:p>
          </table:table-cell>
          <table:table-cell office:value-type="float" office:value="-8.98032" calcext:value-type="float">
            <text:p>-8.98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9733" calcext:value-type="float">
            <text:p>0.819733</text:p>
          </table:table-cell>
          <table:table-cell office:value-type="float" office:value="0.763017" calcext:value-type="float">
            <text:p>0.763017</text:p>
          </table:table-cell>
          <table:table-cell office:value-type="float" office:value="1.275804" calcext:value-type="float">
            <text:p>1.275804</text:p>
          </table:table-cell>
          <table:table-cell office:value-type="float" office:value="6.892301" calcext:value-type="float">
            <text:p>6.892301</text:p>
          </table:table-cell>
          <table:table-cell office:value-type="float" office:value="3.393189" calcext:value-type="float">
            <text:p>3.393189</text:p>
          </table:table-cell>
          <table:table-cell office:value-type="float" office:value="-10.360399" calcext:value-type="float">
            <text:p>-10.360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0469" calcext:value-type="float">
            <text:p>1.140469</text:p>
          </table:table-cell>
          <table:table-cell office:value-type="float" office:value="1.069079" calcext:value-type="float">
            <text:p>1.069079</text:p>
          </table:table-cell>
          <table:table-cell office:value-type="float" office:value="1.788605" calcext:value-type="float">
            <text:p>1.788605</text:p>
          </table:table-cell>
          <table:table-cell office:value-type="float" office:value="9.554136" calcext:value-type="float">
            <text:p>9.554136</text:p>
          </table:table-cell>
          <table:table-cell office:value-type="float" office:value="3.775073" calcext:value-type="float">
            <text:p>3.775073</text:p>
          </table:table-cell>
          <table:table-cell office:value-type="float" office:value="-11.711072" calcext:value-type="float">
            <text:p>-11.711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33372" calcext:value-type="float">
            <text:p>1.733372</text:p>
          </table:table-cell>
          <table:table-cell office:value-type="float" office:value="1.636336" calcext:value-type="float">
            <text:p>1.636336</text:p>
          </table:table-cell>
          <table:table-cell office:value-type="float" office:value="2.74047" calcext:value-type="float">
            <text:p>2.74047</text:p>
          </table:table-cell>
          <table:table-cell office:value-type="float" office:value="13.449785" calcext:value-type="float">
            <text:p>13.449785</text:p>
          </table:table-cell>
          <table:table-cell office:value-type="float" office:value="4.043123" calcext:value-type="float">
            <text:p>4.043123</text:p>
          </table:table-cell>
          <table:table-cell office:value-type="float" office:value="-13.518487" calcext:value-type="float">
            <text:p>-13.518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01844" calcext:value-type="float">
            <text:p>2.701844</text:p>
          </table:table-cell>
          <table:table-cell office:value-type="float" office:value="2.566728" calcext:value-type="float">
            <text:p>2.566728</text:p>
          </table:table-cell>
          <table:table-cell office:value-type="float" office:value="4.294668" calcext:value-type="float">
            <text:p>4.294668</text:p>
          </table:table-cell>
          <table:table-cell office:value-type="float" office:value="18.217736" calcext:value-type="float">
            <text:p>18.217736</text:p>
          </table:table-cell>
          <table:table-cell office:value-type="float" office:value="4.378106" calcext:value-type="float">
            <text:p>4.378106</text:p>
          </table:table-cell>
          <table:table-cell office:value-type="float" office:value="-15.68405" calcext:value-type="float">
            <text:p>-15.684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251582" calcext:value-type="float">
            <text:p>4.251582</text:p>
          </table:table-cell>
          <table:table-cell office:value-type="float" office:value="4.062557" calcext:value-type="float">
            <text:p>4.062557</text:p>
          </table:table-cell>
          <table:table-cell office:value-type="float" office:value="6.775968" calcext:value-type="float">
            <text:p>6.775968</text:p>
          </table:table-cell>
          <table:table-cell office:value-type="float" office:value="23.877184" calcext:value-type="float">
            <text:p>23.877184</text:p>
          </table:table-cell>
          <table:table-cell office:value-type="float" office:value="4.758975" calcext:value-type="float">
            <text:p>4.758975</text:p>
          </table:table-cell>
          <table:table-cell office:value-type="float" office:value="-18.186118" calcext:value-type="float">
            <text:p>-18.186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51663" calcext:value-type="float">
            <text:p>6.051663</text:p>
          </table:table-cell>
          <table:table-cell office:value-type="float" office:value="5.803986" calcext:value-type="float">
            <text:p>5.803986</text:p>
          </table:table-cell>
          <table:table-cell office:value-type="float" office:value="9.652361" calcext:value-type="float">
            <text:p>9.652361</text:p>
          </table:table-cell>
          <table:table-cell office:value-type="float" office:value="28.912454" calcext:value-type="float">
            <text:p>28.912454</text:p>
          </table:table-cell>
          <table:table-cell office:value-type="float" office:value="5.115305" calcext:value-type="float">
            <text:p>5.115305</text:p>
          </table:table-cell>
          <table:table-cell office:value-type="float" office:value="-20.38747" calcext:value-type="float">
            <text:p>-20.387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10096" calcext:value-type="float">
            <text:p>7.710096</text:p>
          </table:table-cell>
          <table:table-cell office:value-type="float" office:value="7.413745" calcext:value-type="float">
            <text:p>7.413745</text:p>
          </table:table-cell>
          <table:table-cell office:value-type="float" office:value="12.28702" calcext:value-type="float">
            <text:p>12.28702</text:p>
          </table:table-cell>
          <table:table-cell office:value-type="float" office:value="32.730837" calcext:value-type="float">
            <text:p>32.730837</text:p>
          </table:table-cell>
          <table:table-cell office:value-type="float" office:value="5.363919" calcext:value-type="float">
            <text:p>5.363919</text:p>
          </table:table-cell>
          <table:table-cell office:value-type="float" office:value="-21.998793" calcext:value-type="float">
            <text:p>-21.9987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0705" calcext:value-type="float">
            <text:p>9.80705</text:p>
          </table:table-cell>
          <table:table-cell office:value-type="float" office:value="9.4599" calcext:value-type="float">
            <text:p>9.4599</text:p>
          </table:table-cell>
          <table:table-cell office:value-type="float" office:value="15.587896" calcext:value-type="float">
            <text:p>15.587896</text:p>
          </table:table-cell>
          <table:table-cell office:value-type="float" office:value="36.855092" calcext:value-type="float">
            <text:p>36.855092</text:p>
          </table:table-cell>
          <table:table-cell office:value-type="float" office:value="5.572286" calcext:value-type="float">
            <text:p>5.572286</text:p>
          </table:table-cell>
          <table:table-cell office:value-type="float" office:value="-23.63949" calcext:value-type="float">
            <text:p>-23.639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422131" calcext:value-type="float">
            <text:p>12.422131</text:p>
          </table:table-cell>
          <table:table-cell office:value-type="float" office:value="12.004312" calcext:value-type="float">
            <text:p>12.004312</text:p>
          </table:table-cell>
          <table:table-cell office:value-type="float" office:value="19.719462" calcext:value-type="float">
            <text:p>19.719462</text:p>
          </table:table-cell>
          <table:table-cell office:value-type="float" office:value="41.222973" calcext:value-type="float">
            <text:p>41.222973</text:p>
          </table:table-cell>
          <table:table-cell office:value-type="float" office:value="5.879015" calcext:value-type="float">
            <text:p>5.879015</text:p>
          </table:table-cell>
          <table:table-cell office:value-type="float" office:value="-25.464998" calcext:value-type="float">
            <text:p>-25.464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000964" calcext:value-type="float">
            <text:p>15.000964</text:p>
          </table:table-cell>
          <table:table-cell office:value-type="float" office:value="14.511519" calcext:value-type="float">
            <text:p>14.511519</text:p>
          </table:table-cell>
          <table:table-cell office:value-type="float" office:value="23.705363" calcext:value-type="float">
            <text:p>23.705363</text:p>
          </table:table-cell>
          <table:table-cell office:value-type="float" office:value="44.957752" calcext:value-type="float">
            <text:p>44.957752</text:p>
          </table:table-cell>
          <table:table-cell office:value-type="float" office:value="6.169302" calcext:value-type="float">
            <text:p>6.169302</text:p>
          </table:table-cell>
          <table:table-cell office:value-type="float" office:value="-26.881245" calcext:value-type="float">
            <text:p>-26.881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101257" calcext:value-type="float">
            <text:p>17.101257</text:p>
          </table:table-cell>
          <table:table-cell office:value-type="float" office:value="16.591394" calcext:value-type="float">
            <text:p>16.591394</text:p>
          </table:table-cell>
          <table:table-cell office:value-type="float" office:value="27.021798" calcext:value-type="float">
            <text:p>27.021798</text:p>
          </table:table-cell>
          <table:table-cell office:value-type="float" office:value="47.741011" calcext:value-type="float">
            <text:p>47.741011</text:p>
          </table:table-cell>
          <table:table-cell office:value-type="float" office:value="6.17893" calcext:value-type="float">
            <text:p>6.17893</text:p>
          </table:table-cell>
          <table:table-cell office:value-type="float" office:value="-27.970728" calcext:value-type="float">
            <text:p>-27.970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58704" calcext:value-type="float">
            <text:p>19.58704</text:p>
          </table:table-cell>
          <table:table-cell office:value-type="float" office:value="18.977837" calcext:value-type="float">
            <text:p>18.977837</text:p>
          </table:table-cell>
          <table:table-cell office:value-type="float" office:value="30.770111" calcext:value-type="float">
            <text:p>30.770111</text:p>
          </table:table-cell>
          <table:table-cell office:value-type="float" office:value="50.661266" calcext:value-type="float">
            <text:p>50.661266</text:p>
          </table:table-cell>
          <table:table-cell office:value-type="float" office:value="6.592144" calcext:value-type="float">
            <text:p>6.592144</text:p>
          </table:table-cell>
          <table:table-cell office:value-type="float" office:value="-29.03666" calcext:value-type="float">
            <text:p>-29.036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253951" calcext:value-type="float">
            <text:p>22.253951</text:p>
          </table:table-cell>
          <table:table-cell office:value-type="float" office:value="21.629573" calcext:value-type="float">
            <text:p>21.629573</text:p>
          </table:table-cell>
          <table:table-cell office:value-type="float" office:value="34.907237" calcext:value-type="float">
            <text:p>34.907237</text:p>
          </table:table-cell>
          <table:table-cell office:value-type="float" office:value="53.631749" calcext:value-type="float">
            <text:p>53.631749</text:p>
          </table:table-cell>
          <table:table-cell office:value-type="float" office:value="6.564892" calcext:value-type="float">
            <text:p>6.564892</text:p>
          </table:table-cell>
          <table:table-cell office:value-type="float" office:value="-30.098177" calcext:value-type="float">
            <text:p>-30.09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227399" calcext:value-type="float">
            <text:p>25.227399</text:p>
          </table:table-cell>
          <table:table-cell office:value-type="float" office:value="24.582089" calcext:value-type="float">
            <text:p>24.582089</text:p>
          </table:table-cell>
          <table:table-cell office:value-type="float" office:value="39.510061" calcext:value-type="float">
            <text:p>39.510061</text:p>
          </table:table-cell>
          <table:table-cell office:value-type="float" office:value="56.665944" calcext:value-type="float">
            <text:p>56.665944</text:p>
          </table:table-cell>
          <table:table-cell office:value-type="float" office:value="6.579494" calcext:value-type="float">
            <text:p>6.579494</text:p>
          </table:table-cell>
          <table:table-cell office:value-type="float" office:value="-31.195935" calcext:value-type="float">
            <text:p>-31.1959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296923" calcext:value-type="float">
            <text:p>28.296923</text:p>
          </table:table-cell>
          <table:table-cell office:value-type="float" office:value="27.647328" calcext:value-type="float">
            <text:p>27.647328</text:p>
          </table:table-cell>
          <table:table-cell office:value-type="float" office:value="44.10618" calcext:value-type="float">
            <text:p>44.10618</text:p>
          </table:table-cell>
          <table:table-cell office:value-type="float" office:value="59.568775" calcext:value-type="float">
            <text:p>59.568775</text:p>
          </table:table-cell>
          <table:table-cell office:value-type="float" office:value="6.544414" calcext:value-type="float">
            <text:p>6.544414</text:p>
          </table:table-cell>
          <table:table-cell office:value-type="float" office:value="-32.037629" calcext:value-type="float">
            <text:p>-32.0376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.67891" calcext:value-type="float">
            <text:p>31.67891</text:p>
          </table:table-cell>
          <table:table-cell office:value-type="float" office:value="30.921221" calcext:value-type="float">
            <text:p>30.921221</text:p>
          </table:table-cell>
          <table:table-cell office:value-type="float" office:value="49.06788" calcext:value-type="float">
            <text:p>49.06788</text:p>
          </table:table-cell>
          <table:table-cell office:value-type="float" office:value="62.441074" calcext:value-type="float">
            <text:p>62.441074</text:p>
          </table:table-cell>
          <table:table-cell office:value-type="float" office:value="6.906364" calcext:value-type="float">
            <text:p>6.906364</text:p>
          </table:table-cell>
          <table:table-cell office:value-type="float" office:value="-32.957436" calcext:value-type="float">
            <text:p>-32.9574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317874" calcext:value-type="float">
            <text:p>35.317874</text:p>
          </table:table-cell>
          <table:table-cell office:value-type="float" office:value="34.6192" calcext:value-type="float">
            <text:p>34.6192</text:p>
          </table:table-cell>
          <table:table-cell office:value-type="float" office:value="54.401001" calcext:value-type="float">
            <text:p>54.401001</text:p>
          </table:table-cell>
          <table:table-cell office:value-type="float" office:value="65.451108" calcext:value-type="float">
            <text:p>65.451108</text:p>
          </table:table-cell>
          <table:table-cell office:value-type="float" office:value="6.666871" calcext:value-type="float">
            <text:p>6.666871</text:p>
          </table:table-cell>
          <table:table-cell office:value-type="float" office:value="-33.653214" calcext:value-type="float">
            <text:p>-33.653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592936" calcext:value-type="float">
            <text:p>39.592936</text:p>
          </table:table-cell>
          <table:table-cell office:value-type="float" office:value="38.844053" calcext:value-type="float">
            <text:p>38.844053</text:p>
          </table:table-cell>
          <table:table-cell office:value-type="float" office:value="60.65101" calcext:value-type="float">
            <text:p>60.65101</text:p>
          </table:table-cell>
          <table:table-cell office:value-type="float" office:value="68.638151" calcext:value-type="float">
            <text:p>68.638151</text:p>
          </table:table-cell>
          <table:table-cell office:value-type="float" office:value="6.818084" calcext:value-type="float">
            <text:p>6.818084</text:p>
          </table:table-cell>
          <table:table-cell office:value-type="float" office:value="-34.584935" calcext:value-type="float">
            <text:p>-34.5849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.554753" calcext:value-type="float">
            <text:p>44.554753</text:p>
          </table:table-cell>
          <table:table-cell office:value-type="float" office:value="43.804122" calcext:value-type="float">
            <text:p>43.804122</text:p>
          </table:table-cell>
          <table:table-cell office:value-type="float" office:value="67.638004" calcext:value-type="float">
            <text:p>67.638004</text:p>
          </table:table-cell>
          <table:table-cell office:value-type="float" office:value="72.097378" calcext:value-type="float">
            <text:p>72.097378</text:p>
          </table:table-cell>
          <table:table-cell office:value-type="float" office:value="6.82544" calcext:value-type="float">
            <text:p>6.82544</text:p>
          </table:table-cell>
          <table:table-cell office:value-type="float" office:value="-35.302092" calcext:value-type="float">
            <text:p>-35.3020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.771433" calcext:value-type="float">
            <text:p>49.771433</text:p>
          </table:table-cell>
          <table:table-cell office:value-type="float" office:value="49.010497" calcext:value-type="float">
            <text:p>49.010497</text:p>
          </table:table-cell>
          <table:table-cell office:value-type="float" office:value="74.992532" calcext:value-type="float">
            <text:p>74.992532</text:p>
          </table:table-cell>
          <table:table-cell office:value-type="float" office:value="75.457858" calcext:value-type="float">
            <text:p>75.457858</text:p>
          </table:table-cell>
          <table:table-cell office:value-type="float" office:value="6.873934" calcext:value-type="float">
            <text:p>6.873934</text:p>
          </table:table-cell>
          <table:table-cell office:value-type="float" office:value="-36.060874" calcext:value-type="float">
            <text:p>-36.0608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.477605" calcext:value-type="float">
            <text:p>55.477605</text:p>
          </table:table-cell>
          <table:table-cell office:value-type="float" office:value="54.66813" calcext:value-type="float">
            <text:p>54.66813</text:p>
          </table:table-cell>
          <table:table-cell office:value-type="float" office:value="82.714561" calcext:value-type="float">
            <text:p>82.714561</text:p>
          </table:table-cell>
          <table:table-cell office:value-type="float" office:value="78.849722" calcext:value-type="float">
            <text:p>78.849722</text:p>
          </table:table-cell>
          <table:table-cell office:value-type="float" office:value="7.030688" calcext:value-type="float">
            <text:p>7.030688</text:p>
          </table:table-cell>
          <table:table-cell office:value-type="float" office:value="-36.646882" calcext:value-type="float">
            <text:p>-36.646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.999019" calcext:value-type="float">
            <text:p>61.999019</text:p>
          </table:table-cell>
          <table:table-cell office:value-type="float" office:value="61.273021" calcext:value-type="float">
            <text:p>61.273021</text:p>
          </table:table-cell>
          <table:table-cell office:value-type="float" office:value="91.359287" calcext:value-type="float">
            <text:p>91.359287</text:p>
          </table:table-cell>
          <table:table-cell office:value-type="float" office:value="82.525297" calcext:value-type="float">
            <text:p>82.525297</text:p>
          </table:table-cell>
          <table:table-cell office:value-type="float" office:value="6.88294" calcext:value-type="float">
            <text:p>6.88294</text:p>
          </table:table-cell>
          <table:table-cell office:value-type="float" office:value="-37.053743" calcext:value-type="float">
            <text:p>-37.0537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.570305" calcext:value-type="float">
            <text:p>69.570305</text:p>
          </table:table-cell>
          <table:table-cell office:value-type="float" office:value="69.030122" calcext:value-type="float">
            <text:p>69.030122</text:p>
          </table:table-cell>
          <table:table-cell office:value-type="float" office:value="100.926678" calcext:value-type="float">
            <text:p>100.926678</text:p>
          </table:table-cell>
          <table:table-cell office:value-type="float" office:value="86.518963" calcext:value-type="float">
            <text:p>86.518963</text:p>
          </table:table-cell>
          <table:table-cell office:value-type="float" office:value="6.565978" calcext:value-type="float">
            <text:p>6.565978</text:p>
          </table:table-cell>
          <table:table-cell office:value-type="float" office:value="-37.152931" calcext:value-type="float">
            <text:p>-37.1529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.151216" calcext:value-type="float">
            <text:p>77.151216</text:p>
          </table:table-cell>
          <table:table-cell office:value-type="float" office:value="76.815933" calcext:value-type="float">
            <text:p>76.815933</text:p>
          </table:table-cell>
          <table:table-cell office:value-type="float" office:value="110.127473" calcext:value-type="float">
            <text:p>110.127473</text:p>
          </table:table-cell>
          <table:table-cell office:value-type="float" office:value="90.236827" calcext:value-type="float">
            <text:p>90.236827</text:p>
          </table:table-cell>
          <table:table-cell office:value-type="float" office:value="6.271579" calcext:value-type="float">
            <text:p>6.271579</text:p>
          </table:table-cell>
          <table:table-cell office:value-type="float" office:value="-37.054956" calcext:value-type="float">
            <text:p>-37.0549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.760435" calcext:value-type="float">
            <text:p>84.760435</text:p>
          </table:table-cell>
          <table:table-cell office:value-type="float" office:value="84.59095" calcext:value-type="float">
            <text:p>84.59095</text:p>
          </table:table-cell>
          <table:table-cell office:value-type="float" office:value="118.776914" calcext:value-type="float">
            <text:p>118.776914</text:p>
          </table:table-cell>
          <table:table-cell office:value-type="float" office:value="93.706566" calcext:value-type="float">
            <text:p>93.706566</text:p>
          </table:table-cell>
          <table:table-cell office:value-type="float" office:value="6.100481" calcext:value-type="float">
            <text:p>6.100481</text:p>
          </table:table-cell>
          <table:table-cell office:value-type="float" office:value="-36.693397" calcext:value-type="float">
            <text:p>-36.6933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.94983" calcext:value-type="float">
            <text:p>94.94983</text:p>
          </table:table-cell>
          <table:table-cell office:value-type="float" office:value="95.189857" calcext:value-type="float">
            <text:p>95.189857</text:p>
          </table:table-cell>
          <table:table-cell office:value-type="float" office:value="129.45735" calcext:value-type="float">
            <text:p>129.45735</text:p>
          </table:table-cell>
          <table:table-cell office:value-type="float" office:value="98.109433" calcext:value-type="float">
            <text:p>98.109433</text:p>
          </table:table-cell>
          <table:table-cell office:value-type="float" office:value="5.594215" calcext:value-type="float">
            <text:p>5.594215</text:p>
          </table:table-cell>
          <table:table-cell office:value-type="float" office:value="-35.678183" calcext:value-type="float">
            <text:p>-35.6781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6.804546" calcext:value-type="float">
            <text:p>106.804546</text:p>
          </table:table-cell>
          <table:table-cell office:value-type="float" office:value="107.539479" calcext:value-type="float">
            <text:p>107.539479</text:p>
          </table:table-cell>
          <table:table-cell office:value-type="float" office:value="139.960586" calcext:value-type="float">
            <text:p>139.960586</text:p>
          </table:table-cell>
          <table:table-cell office:value-type="float" office:value="102.844923" calcext:value-type="float">
            <text:p>102.844923</text:p>
          </table:table-cell>
          <table:table-cell office:value-type="float" office:value="5.078653" calcext:value-type="float">
            <text:p>5.078653</text:p>
          </table:table-cell>
          <table:table-cell office:value-type="float" office:value="-33.636416" calcext:value-type="float">
            <text:p>-33.6364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.697428" calcext:value-type="float">
            <text:p>115.697428</text:p>
          </table:table-cell>
          <table:table-cell office:value-type="float" office:value="116.89763" calcext:value-type="float">
            <text:p>116.89763</text:p>
          </table:table-cell>
          <table:table-cell office:value-type="float" office:value="146.234283" calcext:value-type="float">
            <text:p>146.234283</text:p>
          </table:table-cell>
          <table:table-cell office:value-type="float" office:value="106.196816" calcext:value-type="float">
            <text:p>106.196816</text:p>
          </table:table-cell>
          <table:table-cell office:value-type="float" office:value="4.60828" calcext:value-type="float">
            <text:p>4.60828</text:p>
          </table:table-cell>
          <table:table-cell office:value-type="float" office:value="-31.369509" calcext:value-type="float">
            <text:p>-31.3695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1.795317" calcext:value-type="float">
            <text:p>121.795317</text:p>
          </table:table-cell>
          <table:table-cell office:value-type="float" office:value="123.381279" calcext:value-type="float">
            <text:p>123.381279</text:p>
          </table:table-cell>
          <table:table-cell office:value-type="float" office:value="149.195392" calcext:value-type="float">
            <text:p>149.195392</text:p>
          </table:table-cell>
          <table:table-cell office:value-type="float" office:value="108.415478" calcext:value-type="float">
            <text:p>108.415478</text:p>
          </table:table-cell>
          <table:table-cell office:value-type="float" office:value="4.2202" calcext:value-type="float">
            <text:p>4.2202</text:p>
          </table:table-cell>
          <table:table-cell office:value-type="float" office:value="-29.167113" calcext:value-type="float">
            <text:p>-29.167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21.795317" calcext:value-type="float">
            <text:p>121.795317</text:p>
          </table:table-cell>
          <table:table-cell office:value-type="float" office:value="123.381279" calcext:value-type="float">
            <text:p>123.381279</text:p>
          </table:table-cell>
          <table:table-cell office:value-type="float" office:value="149.195392" calcext:value-type="float">
            <text:p>149.195392</text:p>
          </table:table-cell>
          <table:table-cell office:value-type="float" office:value="108.415478" calcext:value-type="float">
            <text:p>108.415478</text:p>
          </table:table-cell>
          <table:table-cell office:value-type="float" office:value="4.2202" calcext:value-type="float">
            <text:p>4.2202</text:p>
          </table:table-cell>
          <table:table-cell office:value-type="float" office:value="-29.167113" calcext:value-type="float">
            <text:p>-29.167113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.427354" calcext:value-type="float">
            <text:p>0.427354</text:p>
          </table:table-cell>
          <table:table-cell office:value-type="float" office:value="0.391151" calcext:value-type="float">
            <text:p>0.391151</text:p>
          </table:table-cell>
          <table:table-cell office:value-type="float" office:value="0.650539" calcext:value-type="float">
            <text:p>0.650539</text:p>
          </table:table-cell>
          <table:table-cell office:value-type="float" office:value="3.533248" calcext:value-type="float">
            <text:p>3.533248</text:p>
          </table:table-cell>
          <table:table-cell office:value-type="float" office:value="2.027347" calcext:value-type="float">
            <text:p>2.027347</text:p>
          </table:table-cell>
          <table:table-cell office:value-type="float" office:value="-6.190266" calcext:value-type="float">
            <text:p>-6.19026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5.509378" calcext:value-type="float">
            <text:p>55.509378</text:p>
          </table:table-cell>
          <table:table-cell office:value-type="float" office:value="31.260651" calcext:value-type="float">
            <text:p>31.260651</text:p>
          </table:table-cell>
          <table:table-cell office:value-type="float" office:value="2.961776" calcext:value-type="float">
            <text:p>2.961776</text:p>
          </table:table-cell>
          <table:table-cell office:value-type="float" office:value="62.727053" calcext:value-type="float">
            <text:p>62.727053</text:p>
          </table:table-cell>
          <table:table-cell office:value-type="float" office:value="76.604324" calcext:value-type="float">
            <text:p>76.604324</text:p>
          </table:table-cell>
          <table:table-cell office:value-type="float" office:value="69.756244" calcext:value-type="float">
            <text:p>69.756244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43.927962" calcext:value-type="float">
            <text:p>43.927962</text:p>
          </table:table-cell>
          <table:table-cell office:value-type="float" office:value="80.674025" calcext:value-type="float">
            <text:p>80.674025</text:p>
          </table:table-cell>
          <table:table-cell office:value-type="float" office:value="8.561921" calcext:value-type="float">
            <text:p>8.561921</text:p>
          </table:table-cell>
          <table:table-cell office:value-type="float" office:value="91.986442" calcext:value-type="float">
            <text:p>91.986442</text:p>
          </table:table-cell>
          <table:table-cell office:value-type="float" office:value="-80.724524" calcext:value-type="float">
            <text:p>-80.724524</text:p>
          </table:table-cell>
          <table:table-cell office:value-type="float" office:value="92.192645" calcext:value-type="float">
            <text:p>92.19264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26.129149" calcext:value-type="float">
            <text:p>26.129149</text:p>
          </table:table-cell>
          <table:table-cell office:value-type="float" office:value="15.251464" calcext:value-type="float">
            <text:p>15.251464</text:p>
          </table:table-cell>
          <table:table-cell office:value-type="float" office:value="139.940875" calcext:value-type="float">
            <text:p>139.940875</text:p>
          </table:table-cell>
          <table:table-cell office:value-type="float" office:value="45.976707" calcext:value-type="float">
            <text:p>45.976707</text:p>
          </table:table-cell>
          <table:table-cell office:value-type="float" office:value="56.419612" calcext:value-type="float">
            <text:p>56.419612</text:p>
          </table:table-cell>
          <table:table-cell office:value-type="float" office:value="-131.673866" calcext:value-type="float">
            <text:p>-131.673866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97.858472" calcext:value-type="float">
            <text:p>97.858472</text:p>
          </table:table-cell>
          <table:table-cell office:value-type="float" office:value="109.628213" calcext:value-type="float">
            <text:p>109.628213</text:p>
          </table:table-cell>
          <table:table-cell office:value-type="float" office:value="10.752346" calcext:value-type="float">
            <text:p>10.752346</text:p>
          </table:table-cell>
          <table:table-cell office:value-type="float" office:value="103.609434" calcext:value-type="float">
            <text:p>103.609434</text:p>
          </table:table-cell>
          <table:table-cell office:value-type="float" office:value="-13.084199" calcext:value-type="float">
            <text:p>-13.084199</text:p>
          </table:table-cell>
          <table:table-cell office:value-type="float" office:value="104.817308" calcext:value-type="float">
            <text:p>104.817308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office:value-type="float" office:value="69.369772" calcext:value-type="float">
            <text:p>69.369772</text:p>
          </table:table-cell>
          <table:table-cell office:value-type="float" office:value="95.278756" calcext:value-type="float">
            <text:p>95.278756</text:p>
          </table:table-cell>
          <table:table-cell office:value-type="float" office:value="147.023925" calcext:value-type="float">
            <text:p>147.023925</text:p>
          </table:table-cell>
          <table:table-cell office:value-type="float" office:value="98.144945" calcext:value-type="float">
            <text:p>98.144945</text:p>
          </table:table-cell>
          <table:table-cell office:value-type="float" office:value="-43.977313" calcext:value-type="float">
            <text:p>-43.977313</text:p>
          </table:table-cell>
          <table:table-cell office:value-type="float" office:value="-45.686949" calcext:value-type="float">
            <text:p>-45.686949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float" office:value="79.519027" calcext:value-type="float">
            <text:p>79.519027</text:p>
          </table:table-cell>
          <table:table-cell office:value-type="float" office:value="45.189122" calcext:value-type="float">
            <text:p>45.189122</text:p>
          </table:table-cell>
          <table:table-cell office:value-type="float" office:value="142.049449" calcext:value-type="float">
            <text:p>142.049449</text:p>
          </table:table-cell>
          <table:table-cell office:value-type="float" office:value="73.016249" calcext:value-type="float">
            <text:p>73.016249</text:p>
          </table:table-cell>
          <table:table-cell office:value-type="float" office:value="85.199175" calcext:value-type="float">
            <text:p>85.199175</text:p>
          </table:table-cell>
          <table:table-cell office:value-type="float" office:value="-86.246025" calcext:value-type="float">
            <text:p>-86.246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2T13:16:52.561472476</meta:creation-date>
    <dc:date>2026-05-12T13:17:56.888328964</dc:date>
    <meta:editing-duration>PT1M4S</meta:editing-duration>
    <meta:editing-cycles>1</meta:editing-cycles>
    <meta:document-statistic meta:table-count="1" meta:cell-count="287" meta:object-count="0"/>
    <meta:generator>LibreOffice/25.8.6.2$Linux_X86_64 LibreOffice_project/9ad09ed4e41fba5287dcc205220c6d606e1ac75e</meta:generator>
  </office:meta>
</office:document-meta>
</file>